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font-weight="bold" style:font-weight-asian="bold" style:font-weight-complex="bold"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</office:automatic-styles>
  <office:body>
    <office:text text:use-soft-page-breaks="true">
      <text:p text:style-name="P1">1 kaarten veranderen, tekeningen erop zetten, mss speciale kaarten maken waar als die getrokkken word je zowiezo wint en die dan een special effect geven.</text:p>
      <text:p text:style-name="P2">Images en kaarten tonen opzoeken</text:p>
      <text:p text:style-name="P3">Pygame image tutorial, sprites tutorial</text:p>
      <text:p text:style-name="P4">Animaties</text:p>
      <text:p text:style-name="P5">Pygame animation tutorial, card animation tutorial</text:p>
      <text:p text:style-name="P6"/>
      <text:p text:style-name="Normal">2 random instellen dat elke game anders is maar voor blackjack is het nogal snel natuurlijk dus mss de parameters van het spel zelf veranderen?</text:p>
      <text:p text:style-name="P7">Random choice tutorial, random events tutorial</text:p>
      <text:p text:style-name="P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whitney van hende</meta:initial-creator>
    <dc:creator>whitney van hende</dc:creator>
    <meta:creation-date>2026-05-22T14:43:00Z</meta:creation-date>
    <dc:date>2026-05-22T14:48:00Z</dc:date>
    <meta:template xlink:href="Normal" xlink:type="simple"/>
    <meta:editing-cycles>1</meta:editing-cycles>
    <meta:editing-duration>PT300S</meta:editing-duration>
    <meta:document-statistic meta:page-count="1" meta:paragraph-count="5" meta:word-count="70" meta:character-count="477" meta:row-count="10" meta:non-whitespace-character-count="412"/>
  </office:meta>
</office:document-meta>
</file>